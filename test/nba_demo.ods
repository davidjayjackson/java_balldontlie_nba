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29in"/>
    </style:style>
    <style:style style:name="co2" style:family="table-column">
      <style:table-column-properties fo:break-before="auto" style:column-width="1.6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 table:null-year="1950"/>
      <table:table table:name="Celtics Demo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balldontlie NBA Calc Add-In - demo (Boston Celtic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figure a balldontlie API key (see README), then recalc with Ctrl+Shift+F9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LOADING means a background fetch just started - recalc again once it settl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 the bottom of this sheet for the optional api_key argument (cell-referenced)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ive result</text:p>
          </table:table-cell>
          <table:table-cell office:value-type="string" calcext:value-type="string">
            <text:p>Formul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A_TEAMID</text:p>
          </table:table-cell>
          <table:table-cell table:style-name="ce1" table:formula="of:=COM.EXAMPLE.NBA.NBAIMPL.NBATEAMID(&quot;Boston Celtics&quot;)" office:value-type="float" office:value="2" calcext:value-type="float">
            <text:p>2</text:p>
          </table:table-cell>
          <table:table-cell table:style-name="ce2" office:value-type="string" calcext:value-type="string">
            <text:p>=NBA_TEAMID("Boston Celtics"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A_SCORE (most recent, 2023-24)</text:p>
          </table:table-cell>
          <table:table-cell table:formula="of:=COM.EXAMPLE.NBA.NBAIMPL.NBASCORE(&quot;2023&quot;;&quot;BOS&quot;)" office:value-type="string" office:string-value="2024-06-17 BOS 106 - 88 DAL (W)" calcext:value-type="string">
            <text:p>2024-06-17 BOS 106 - 88 DAL (W)</text:p>
          </table:table-cell>
          <table:table-cell table:style-name="ce2" office:value-type="string" calcext:value-type="string">
            <text:p>=NBA_SCORE("2023";"BOS"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A_SCORE (2nd most recent)</text:p>
          </table:table-cell>
          <table:table-cell table:formula="of:=COM.EXAMPLE.NBA.NBAIMPL.NBASCORE(&quot;2023&quot;;&quot;BOS&quot;;2)" office:value-type="string" office:string-value="2024-06-14 BOS 84 - 122 DAL (L)" calcext:value-type="string">
            <text:p>2024-06-14 BOS 84 - 122 DAL (L)</text:p>
          </table:table-cell>
          <table:table-cell table:style-name="ce2" office:value-type="string" calcext:value-type="string">
            <text:p>=NBA_SCORE("2023";"BOS";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A_TEAMRANK <text:s/>[needs paid tier]</text:p>
          </table:table-cell>
          <table:table-cell table:formula="of:=COM.EXAMPLE.NBA.NBAIMPL.NBATEAMRANK(&quot;2023&quot;;&quot;BOS&quot;)" office:value-type="string" office:string-value="#LOADING" calcext:value-type="string">
            <text:p>#LOADING</text:p>
          </table:table-cell>
          <table:table-cell table:style-name="ce2" office:value-type="string" calcext:value-type="string">
            <text:p>=NBA_TEAMRANK("2023";"BOS"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A_PLAYERID</text:p>
          </table:table-cell>
          <table:table-cell table:style-name="ce1" table:formula="of:=COM.EXAMPLE.NBA.NBAIMPL.NBAPLAYERID(&quot;Jayson Tatum&quot;)" office:value-type="float" office:value="434" calcext:value-type="float">
            <text:p>434</text:p>
          </table:table-cell>
          <table:table-cell table:style-name="ce2" office:value-type="string" calcext:value-type="string">
            <text:p>=NBA_PLAYERID("Jayson Tatum"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A_PLAYERSTAT pts <text:s/>[needs paid tier]</text:p>
          </table:table-cell>
          <table:table-cell table:formula="of:=COM.EXAMPLE.NBA.NBAIMPL.NBAPLAYERSTAT(&quot;2023&quot;;COM.EXAMPLE.NBA.NBAIMPL.NBAPLAYERID(&quot;Jayson Tatum&quot;);&quot;pts&quot;)" office:value-type="string" office:string-value="#LOADING" calcext:value-type="string">
            <text:p>#LOADING</text:p>
          </table:table-cell>
          <table:table-cell table:style-name="ce2" office:value-type="string" calcext:value-type="string">
            <text:p>=NBA_PLAYERSTAT("2023";NBA_PLAYERID("Jayson Tatum");"pts"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A_LASTERROR</text:p>
          </table:table-cell>
          <table:table-cell table:formula="of:=COM.EXAMPLE.NBA.NBAIMPL.NBALASTERROR()" office:value-type="string" office:string-value="balldontlie returned HTTP 401: Unauthorized" calcext:value-type="string">
            <text:p>balldontlie returned HTTP 401: Unauthorized</text:p>
          </table:table-cell>
          <table:table-cell table:style-name="ce2" office:value-type="string" calcext:value-type="string">
            <text:p>=NBA_LASTERROR()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BA_GAMES (array formula, BOS 2023-24 season, first 15 rows shown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status</text:p>
          </table:table-cell>
          <table:table-cell table:number-columns-repeated="5"/>
        </table:table-row>
        <table:table-row table:style-name="ro1">
          <table:table-cell table:number-matrix-columns-spanned="6" table:number-matrix-rows-spanned="15" table:formula="of:=COM.EXAMPLE.NBA.NBAIMPL.NBAGAMES(&quot;2023&quot;;COM.EXAMPLE.NBA.NBAIMPL.NBATEAMID(&quot;Boston Celtics&quot;))" office:value-type="string" office:string-value="2023-10-25" calcext:value-type="string">
            <text:p>2023-10-25</text:p>
          </table:table-cell>
          <table:table-cell office:value-type="string" office:string-value="NYK" calcext:value-type="string">
            <text:p>NYK</text:p>
          </table:table-cell>
          <table:table-cell office:value-type="float" office:value="104" calcext:value-type="float">
            <text:p>104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08" calcext:value-type="float">
            <text:p>108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0-27" calcext:value-type="string">
            <text:p>2023-10-27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19" calcext:value-type="float">
            <text:p>119</text:p>
          </table:table-cell>
          <table:table-cell office:value-type="string" office:string-value="MIA" calcext:value-type="string">
            <text:p>MIA</text:p>
          </table:table-cell>
          <table:table-cell office:value-type="float" office:value="111" calcext:value-type="float">
            <text:p>111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0-30" calcext:value-type="string">
            <text:p>2023-10-30</text:p>
          </table:table-cell>
          <table:table-cell office:value-type="string" office:string-value="WAS" calcext:value-type="string">
            <text:p>WAS</text:p>
          </table:table-cell>
          <table:table-cell office:value-type="float" office:value="107" calcext:value-type="float">
            <text:p>107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26" calcext:value-type="float">
            <text:p>126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01" calcext:value-type="string">
            <text:p>2023-11-01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55" calcext:value-type="float">
            <text:p>155</text:p>
          </table:table-cell>
          <table:table-cell office:value-type="string" office:string-value="IND" calcext:value-type="string">
            <text:p>IND</text:p>
          </table:table-cell>
          <table:table-cell office:value-type="float" office:value="104" calcext:value-type="float">
            <text:p>104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04" calcext:value-type="string">
            <text:p>2023-11-04</text:p>
          </table:table-cell>
          <table:table-cell office:value-type="string" office:string-value="BKN" calcext:value-type="string">
            <text:p>BKN</text:p>
          </table:table-cell>
          <table:table-cell office:value-type="float" office:value="114" calcext:value-type="float">
            <text:p>114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24" calcext:value-type="float">
            <text:p>124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06" calcext:value-type="string">
            <text:p>2023-11-06</text:p>
          </table:table-cell>
          <table:table-cell office:value-type="string" office:string-value="MIN" calcext:value-type="string">
            <text:p>MIN</text:p>
          </table:table-cell>
          <table:table-cell office:value-type="float" office:value="114" calcext:value-type="float">
            <text:p>114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09" calcext:value-type="float">
            <text:p>109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08" calcext:value-type="string">
            <text:p>2023-11-08</text:p>
          </table:table-cell>
          <table:table-cell office:value-type="string" office:string-value="PHI" calcext:value-type="string">
            <text:p>PHI</text:p>
          </table:table-cell>
          <table:table-cell office:value-type="float" office:value="106" calcext:value-type="float">
            <text:p>106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03" calcext:value-type="float">
            <text:p>103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10" calcext:value-type="string">
            <text:p>2023-11-10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21" calcext:value-type="float">
            <text:p>121</text:p>
          </table:table-cell>
          <table:table-cell office:value-type="string" office:string-value="BKN" calcext:value-type="string">
            <text:p>BKN</text:p>
          </table:table-cell>
          <table:table-cell office:value-type="float" office:value="107" calcext:value-type="float">
            <text:p>107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11" calcext:value-type="string">
            <text:p>2023-11-11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17" calcext:value-type="float">
            <text:p>117</text:p>
          </table:table-cell>
          <table:table-cell office:value-type="string" office:string-value="TOR" calcext:value-type="string">
            <text:p>TOR</text:p>
          </table:table-cell>
          <table:table-cell office:value-type="float" office:value="94" calcext:value-type="float">
            <text:p>94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13" calcext:value-type="string">
            <text:p>2023-11-13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14" calcext:value-type="float">
            <text:p>114</text:p>
          </table:table-cell>
          <table:table-cell office:value-type="string" office:string-value="NYK" calcext:value-type="string">
            <text:p>NYK</text:p>
          </table:table-cell>
          <table:table-cell office:value-type="float" office:value="98" calcext:value-type="float">
            <text:p>98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15" calcext:value-type="string">
            <text:p>2023-11-15</text:p>
          </table:table-cell>
          <table:table-cell office:value-type="string" office:string-value="PHI" calcext:value-type="string">
            <text:p>PHI</text:p>
          </table:table-cell>
          <table:table-cell office:value-type="float" office:value="107" calcext:value-type="float">
            <text:p>107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17" calcext:value-type="float">
            <text:p>117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17" calcext:value-type="string">
            <text:p>2023-11-17</text:p>
          </table:table-cell>
          <table:table-cell office:value-type="string" office:string-value="TOR" calcext:value-type="string">
            <text:p>TOR</text:p>
          </table:table-cell>
          <table:table-cell office:value-type="float" office:value="105" calcext:value-type="float">
            <text:p>105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08" calcext:value-type="float">
            <text:p>108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19" calcext:value-type="string">
            <text:p>2023-11-19</text:p>
          </table:table-cell>
          <table:table-cell office:value-type="string" office:string-value="MEM" calcext:value-type="string">
            <text:p>MEM</text:p>
          </table:table-cell>
          <table:table-cell office:value-type="float" office:value="100" calcext:value-type="float">
            <text:p>100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02" calcext:value-type="float">
            <text:p>102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20" calcext:value-type="string">
            <text:p>2023-11-20</text:p>
          </table:table-cell>
          <table:table-cell office:value-type="string" office:string-value="CHA" calcext:value-type="string">
            <text:p>CHA</text:p>
          </table:table-cell>
          <table:table-cell office:value-type="float" office:value="121" calcext:value-type="float">
            <text:p>121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18" calcext:value-type="float">
            <text:p>118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office:string-value="2023-11-22" calcext:value-type="string">
            <text:p>2023-11-22</text:p>
          </table:table-cell>
          <table:table-cell office:value-type="string" office:string-value="BOS" calcext:value-type="string">
            <text:p>BOS</text:p>
          </table:table-cell>
          <table:table-cell office:value-type="float" office:value="119" calcext:value-type="float">
            <text:p>119</text:p>
          </table:table-cell>
          <table:table-cell office:value-type="string" office:string-value="MIL" calcext:value-type="string">
            <text:p>MIL</text:p>
          </table:table-cell>
          <table:table-cell office:value-type="float" office:value="116" calcext:value-type="float">
            <text:p>116</text:p>
          </table:table-cell>
          <table:table-cell office:value-type="string" office:string-value="Final" calcext:value-type="string">
            <text:p>Final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{=NBA_GAMES("2023";NBA_TEAMID("Boston Celtics"))} <text:s/>(select range, Ctrl+Shift+Enter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BA_PLAYERSEARCH (array formula, search="Tatum"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eam</text:p>
          </table:table-cell>
          <table:table-cell table:number-columns-repeated="6"/>
        </table:table-row>
        <table:table-row table:style-name="ro1">
          <table:table-cell table:number-matrix-columns-spanned="5" table:number-matrix-rows-spanned="5" table:formula="of:=COM.EXAMPLE.NBA.NBAIMPL.NBAPLAYERSEARCH(&quot;Tatum&quot;)" office:value-type="float" office:value="434" calcext:value-type="float">
            <text:p>434</text:p>
          </table:table-cell>
          <table:table-cell office:value-type="string" office:string-value="Jayson" calcext:value-type="string">
            <text:p>Jayson</text:p>
          </table:table-cell>
          <table:table-cell office:value-type="string" office:string-value="Tatum" calcext:value-type="string">
            <text:p>Tatum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BOS" calcext:value-type="string">
            <text:p>BOS</text:p>
          </table:table-cell>
          <table:table-cell table:number-columns-repeated="6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office:string-value="Earl" calcext:value-type="string">
            <text:p>Earl</text:p>
          </table:table-cell>
          <table:table-cell office:value-type="string" office:string-value="Tatum" calcext:value-type="string">
            <text:p>Tatum</text:p>
          </table:table-cell>
          <table:table-cell>
            <text:p/>
          </table:table-cell>
          <table:table-cell office:value-type="string" office:string-value="LAL" calcext:value-type="string">
            <text:p>LAL</text:p>
          </table:table-cell>
          <table:table-cell table:number-columns-repeated="6"/>
        </table:table-row>
        <table:table-row table:style-name="ro1"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"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"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{=NBA_PLAYERSEARCH("Tatum")} <text:s/>(select range, Ctrl+Shift+Enter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BA_STANDINGS (array formula, East) <text:s/>[needs paid tier - shows #ERR on a free key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ference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ses</text:p>
          </table:table-cell>
          <table:table-cell office:value-type="string" calcext:value-type="string">
            <text:p>win_pct</text:p>
          </table:table-cell>
          <table:table-cell office:value-type="string" calcext:value-type="string">
            <text:p>conf_rank</text:p>
          </table:table-cell>
          <table:table-cell table:number-columns-repeated="4"/>
        </table:table-row>
        <table:table-row table:style-name="ro1">
          <table:table-cell table:number-matrix-columns-spanned="7" table:number-matrix-rows-spanned="5" table:formula="of:=COM.EXAMPLE.NBA.NBAIMPL.NBASTANDINGS(&quot;2023&quot;;&quot;East&quot;)"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table:number-columns-repeated="4"/>
        </table:table-row>
        <table:table-row table:style-name="ro1"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table:number-columns-repeated="4"/>
        </table:table-row>
        <table:table-row table:style-name="ro1"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table:number-columns-repeated="4"/>
        </table:table-row>
        <table:table-row table:style-name="ro1"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table:number-columns-repeated="4"/>
        </table:table-row>
        <table:table-row table:style-name="ro1"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{=NBA_STANDINGS("2023";"East")} <text:s/>(select range, Ctrl+Shift+Enter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BA_BOXSCORE (array formula, game 1037597, BOS @ NYK 2023-10-25) <text:s/>[needs paid tier - shows #ERR on a free key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reb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fg_pct</text:p>
          </table:table-cell>
          <table:table-cell office:value-type="string" calcext:value-type="string">
            <text:p>fg3_pct</text:p>
          </table:table-cell>
          <table:table-cell office:value-type="string" calcext:value-type="string">
            <text:p>ft_pct</text:p>
          </table:table-cell>
        </table:table-row>
        <table:table-row table:style-name="ro1">
          <table:table-cell table:number-matrix-columns-spanned="11" table:number-matrix-rows-spanned="10" table:formula="of:=COM.EXAMPLE.NBA.NBAIMPL.NBABOXSCORE(1037597)"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</table:table-row>
        <table:table-row table:style-name="ro1"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</table:table-row>
        <table:table-row table:style-name="ro1"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</table:table-row>
        <table:table-row table:style-name="ro1"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</table:table-row>
        <table:table-row table:style-name="ro1"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</table:table-row>
        <table:table-row table:style-name="ro1"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</table:table-row>
        <table:table-row table:style-name="ro1"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</table:table-row>
        <table:table-row table:style-name="ro1"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</table:table-row>
        <table:table-row table:style-name="ro1"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</table:table-row>
        <table:table-row table:style-name="ro1"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  <table:table-cell office:value-type="string" office:string-value="#LOADING" calcext:value-type="string">
            <text:p>#LOADING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{=NBA_BOXSCORE(1037597)} <text:s/>(select range, Ctrl+Shift+Enter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sing the api_key argument (overrides the environment for one call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ur_api_key -- paste your own balldontlie key here to override the environment</text:p>
          </table:table-cell>
          <table:table-cell office:value-type="string" calcext:value-type="string">
            <text:p>YOUR_API_KEY_HE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BA_TEAMID with explicit api_key argument (placeholder above -&gt; expect #ERR)</text:p>
          </table:table-cell>
          <table:table-cell table:formula="of:=COM.EXAMPLE.NBA.NBAIMPL.NBATEAMID(&quot;Boston Celtics&quot;;[.B71])" office:value-type="string" office:string-value="#ERR" calcext:value-type="string">
            <text:p>#ERR</text:p>
          </table:table-cell>
          <table:table-cell table:style-name="ce2" office:value-type="string" calcext:value-type="string">
            <text:p>=NBA_TEAMID("Boston Celtics";B7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A_LASTERROR (reflects the placeholder-key rejection above)</text:p>
          </table:table-cell>
          <table:table-cell table:formula="of:=COM.EXAMPLE.NBA.NBAIMPL.NBALASTERROR()" office:value-type="string" office:string-value="balldontlie returned HTTP 401: Unauthorized" calcext:value-type="string">
            <text:p>balldontlie returned HTTP 401: Unauthorized</text:p>
          </table:table-cell>
          <table:table-cell table:style-name="ce2" office:value-type="string" calcext:value-type="string">
            <text:p>=NBA_LASTERROR(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5T23:01:34.853729230</meta:creation-date>
    <dc:date>2026-07-15T23:03:22.200840634</dc:date>
    <meta:editing-duration>PT1M47S</meta:editing-duration>
    <meta:editing-cycles>1</meta:editing-cycles>
    <meta:document-statistic meta:table-count="1" meta:cell-count="334" meta:object-count="0"/>
    <meta:generator>LibreOffice/26.2.4.2$Linux_X86_64 LibreOffice_project/0229ac93fcf0d7cbc6376066c6f35021cef002dc</meta:generator>
  </office:meta>
</office:document-meta>
</file>